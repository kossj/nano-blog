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eed2c" officeooo:paragraph-rsid="000eed2c"/>
    </style:style>
    <style:style style:name="P2" style:family="paragraph" style:parent-style-name="Standard">
      <style:text-properties officeooo:rsid="000ff150" officeooo:paragraph-rsid="000ff150"/>
    </style:style>
    <style:style style:name="T1" style:family="text">
      <style:text-properties officeooo:rsid="000ff1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ck Everett Koss</text:p>
      <text:p text:style-name="P1">Will send one message per day with a selected Word Of The Day and description</text:p>
      <text:p text:style-name="P1">Text HELP or call +1 713-252-3940 for support</text:p>
      <text:p text:style-name="P1">Text STOP to opt-out of future messages</text:p>
      <text:p text:style-name="P1">Message and data rates may apply</text:p>
      <text:p text:style-name="P1"/>
      <text:p text:style-name="P1">Privacy Policy at:</text:p>
      <text:p text:style-name="P1"><text:a xlink:type="simple" xlink:href="https://jackkoss.org/privacy" text:style-name="Internet_20_link" text:visited-style-name="Visited_20_Internet_20_Link">https://jackkoss.org/privacy</text:a></text:p>
      <text:p text:style-name="P1"/>
      <text:p text:style-name="P1">Terms and Conditions at:</text:p>
      <text:p text:style-name="P1"><text:a xlink:type="simple" xlink:href="https://jackkoss.org/toc" text:style-name="Internet_20_link" text:visited-style-name="Visited_20_Internet_20_Link">https://jackkoss.org/toc</text:a></text:p>
      <text:p text:style-name="P1"/>
      <text:p text:style-name="P1">If you would like to receive these messages, <text:span text:style-name="T1">then write your phone number and sign on the lines indicated below.</text:span></text:p>
      <text:p text:style-name="P1"/>
      <text:p text:style-name="P2">___ ___ ____</text:p>
      <text:p text:style-name="P2">^ PHONE</text:p>
      <text:p text:style-name="P2"/>
      <text:p text:style-name="P2">__________________________</text:p>
      <text:p text:style-name="P2">^ SIGNATURE</text:p>
      <text:p text:style-name="P2"/>
      <text:p text:style-name="P2">__________________________</text:p>
      <text:p text:style-name="P2">^ PRINT NA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8T14:02:13.542546000</meta:creation-date>
    <dc:date>2026-07-08T14:48:15.591290000</dc:date>
    <meta:editing-duration>PT46M1S</meta:editing-duration>
    <meta:editing-cycles>3</meta:editing-cycles>
    <meta:generator>LibreOffice/26.2.3.2$MacOSX_AARCH64 LibreOffice_project/70e089b17412e4cb7773e41413306b17a2328c34</meta:generator>
    <meta:document-statistic meta:table-count="0" meta:image-count="0" meta:object-count="0" meta:page-count="1" meta:paragraph-count="16" meta:word-count="80" meta:character-count="510" meta:non-whitespace-character-count="446"/>
  </office:meta>
</office:document-meta>
</file>